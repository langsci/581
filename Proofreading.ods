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eneral introduction</text:p>
          </table:table-cell>
          <table:table-cell office:value-type="string" calcext:value-type="string">
            <text:p>MaryAnn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string" calcext:value-type="string">
            <text:p>Focus and focus realization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Nicolett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Subject focus in Spanish and French: an unsolved matter</text:p>
          </table:table-cell>
          <table:table-cell office:value-type="string" calcext:value-type="string">
            <text:p>Esénia</text:p>
          </table:table-cell>
          <table:table-cell office:value-type="string" calcext:value-type="string">
            <text:p>Nicolett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string" calcext:value-type="string">
            <text:p>Frequency of subject focus-marking strategies</text:p>
          </table:table-cell>
          <table:table-cell office:value-type="string" calcext:value-type="string">
            <text:p>Mahaman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rett</text:p>
          </table:table-cell>
        </table:table-row>
        <table:table-row table:style-name="ro1">
          <table:table-cell office:value-type="string" calcext:value-type="string">
            <text:p>The alternation between full and elliptical answer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string" calcext:value-type="string">
            <text:p>Pragmatic and semantic factors in syntactic variation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string" calcext:value-type="string">
            <text:p>Discussion 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string" calcext:value-type="string">
            <text:p>General discussion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An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22:57:00.760118414</meta:creation-date>
    <dc:date>2026-02-17T23:03:29.368967221</dc:date>
    <meta:editing-duration>PT6M29S</meta:editing-duration>
    <meta:editing-cycles>1</meta:editing-cycles>
    <meta:generator>LibreOffice/7.4.7.2$Linux_X86_64 LibreOffice_project/40$Build-2</meta:generator>
    <meta:document-statistic meta:table-count="1" meta:cell-count="34" meta:object-count="0"/>
  </office:meta>
</office:document-meta>
</file>